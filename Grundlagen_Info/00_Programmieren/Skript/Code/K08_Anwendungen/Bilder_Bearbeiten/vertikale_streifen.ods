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Sans NF" svg:font-family="'NotoSans NF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181in"/>
    </style:style>
    <style:style style:name="co2" style:family="table-column">
      <style:table-column-properties fo:break-before="auto" style:column-width="0.2256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2.9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  <style:text-properties fo:color="#000000" fo:font-size="6pt" style:font-size-asian="6pt" style:font-size-complex="6pt"/>
    </style:style>
    <style:style style:name="ce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color="#000000" fo:font-size="6pt" style:font-size-asian="6pt" style:font-size-complex="6pt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a1467e"/>
      <style:text-properties fo:color="#000000"/>
    </style:style>
    <style:style style:name="ce8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ce3"/>
        <table:table-column table:style-name="co2" table:number-columns-repeated="2" table:default-cell-style-name="ce1"/>
        <table:table-column table:style-name="co2" table:number-columns-repeated="3" table:default-cell-style-name="ce3"/>
        <table:table-column table:style-name="co2" table:number-columns-repeated="2" table:default-cell-style-name="ce1"/>
        <table:table-column table:style-name="co2" table:number-columns-repeated="3" table:default-cell-style-name="ce3"/>
        <table:table-column table:style-name="co2" table:number-columns-repeated="2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globaler Index</text:p>
          </table:table-cell>
          <table:covered-table-cell table:number-columns-repeated="4" table:style-name="Default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5" office:value-type="string" calcext:value-type="string">
            <text:p>“globaler” Index <text:span text:style-name="T1">i läuft</text:span> von 0 bis und mit 23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6" office:value-type="string" calcext:value-type="string">
            <text:p>original Pixel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7" office:value-type="string" calcext:value-type="string">
            <text:p>Streifen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8" office:value-type="string" calcext:value-type="string">
            <text:p>hier in diesem Beispiel: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6" office:value-type="string" calcext:value-type="string">
            <text:p>gap = 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7" office:value-type="string" calcext:value-type="string">
            <text:p>stripe_width = 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4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8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Spaltenindex</text:p>
          </table:table-cell>
          <table:covered-table-cell table:number-columns-repeated="4" table:style-name="ce13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Spaltenindex “col”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l = i % 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4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8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Blockindex</text:p>
          </table:table-cell>
          <table:covered-table-cell table:number-columns-repeated="4" table:style-name="ce13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ock_index = col % (stripe_width + gap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stripe_width + gap</text:p>
          </table:table-cell>
          <table:covered-table-cell table:number-columns-repeated="4" table:style-name="Default"/>
          <table:table-cell table:style-name="ce4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Sans NF" svg:font-family="'NotoSans NF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SC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08:42:51.1257912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08:07:21.257894849</meta:creation-date>
    <dc:date>2025-10-24T09:00:54.916095311</dc:date>
    <meta:editing-duration>PT6H43M26S</meta:editing-duration>
    <meta:editing-cycles>11</meta:editing-cycles>
    <meta:generator>LibreOffice/25.8.2.2$Linux_X86_64 LibreOffice_project/580$Build-2</meta:generator>
    <meta:document-statistic meta:table-count="1" meta:cell-count="723" meta:object-count="0"/>
  </office:meta>
</office:document-meta>
</file>